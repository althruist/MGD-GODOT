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8000000329C38DA3F.png" manifest:media-type="image/png"/>
  <manifest:file-entry manifest:full-path="Pictures/10000001000002900000006B7A098EA1.png" manifest:media-type="image/png"/>
  <manifest:file-entry manifest:full-path="Pictures/1000000100000459000001E1A95508DE.png" manifest:media-type="image/png"/>
  <manifest:file-entry manifest:full-path="Pictures/10000001000004180000007A19F03A47.png" manifest:media-type="image/png"/>
  <manifest:file-entry manifest:full-path="Pictures/100000010000067D0000032D2C0473DA.png" manifest:media-type="image/png"/>
  <manifest:file-entry manifest:full-path="Pictures/100000010000027B0000006D4EAC3F3B.png" manifest:media-type="image/png"/>
  <manifest:file-entry manifest:full-path="Pictures/100000010000041300000287DCE5B25C.png" manifest:media-type="image/png"/>
  <manifest:file-entry manifest:full-path="Pictures/100000010000041500000101B3A5E221.png" manifest:media-type="image/png"/>
  <manifest:file-entry manifest:full-path="Pictures/10000001000004BE000001CE66E39FF2.png" manifest:media-type="image/png"/>
  <manifest:file-entry manifest:full-path="Pictures/10000001000002EE00000217E940C178.png" manifest:media-type="image/png"/>
  <manifest:file-entry manifest:full-path="Pictures/100000010000057600000263EF3033C3.png" manifest:media-type="image/png"/>
  <manifest:file-entry manifest:full-path="Pictures/10000001000003C200000216D0CC2D74.png" manifest:media-type="image/png"/>
  <manifest:file-entry manifest:full-path="Pictures/10000001000002D00000005A75D4B25B.png" manifest:media-type="image/png"/>
  <manifest:file-entry manifest:full-path="Pictures/10000001000003C10000014A824DC1FC.png" manifest:media-type="image/png"/>
  <manifest:file-entry manifest:full-path="Pictures/10000001000005760000031C8341AC29.png" manifest:media-type="image/png"/>
  <manifest:file-entry manifest:full-path="Pictures/10000001000004350000023BCA195763.png" manifest:media-type="image/png"/>
  <manifest:file-entry manifest:full-path="Pictures/10000001000003A300000174867B9500.png" manifest:media-type="image/png"/>
  <manifest:file-entry manifest:full-path="Pictures/10000001000002DE000001941EE697CE.png" manifest:media-type="image/png"/>
  <manifest:file-entry manifest:full-path="Pictures/10000001000004470000029CFDAE9FD5.png" manifest:media-type="image/png"/>
  <manifest:file-entry manifest:full-path="Pictures/100000010000062E000003F31DC62F7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officeooo:rsid="000df475" officeooo:paragraph-rsid="000df475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72pt" officeooo:rsid="000df475" officeooo:paragraph-rsid="000df475" style:font-size-asian="63pt" style:font-size-complex="72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22pt" officeooo:rsid="000df475" officeooo:paragraph-rsid="000df475" style:font-size-asian="19.25pt" style:font-size-complex="22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Arial1" fo:font-size="14pt" officeooo:rsid="000df475" officeooo:paragraph-rsid="000df47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4pt" officeooo:rsid="000df475" officeooo:paragraph-rsid="000df47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4pt" fo:font-weight="normal" officeooo:rsid="000df475" officeooo:paragraph-rsid="000df47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4pt" fo:font-weight="normal" officeooo:rsid="000e853d" officeooo:paragraph-rsid="000e853d" style:font-size-asian="4pt" style:font-weight-asian="normal" style:font-size-complex="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4pt" fo:font-weight="normal" officeooo:rsid="000e853d" officeooo:paragraph-rsid="000e853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6pt" fo:font-weight="normal" officeooo:rsid="000e853d" officeooo:paragraph-rsid="000e853d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1" fo:font-size="14pt" fo:font-weight="normal" officeooo:rsid="000fc025" officeooo:paragraph-rsid="000fc02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weight="normal" officeooo:rsid="000fc025" officeooo:paragraph-rsid="000fc02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fo:font-weight="normal" officeooo:rsid="000fd1fc" officeooo:paragraph-rsid="000fd1f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fo:font-weight="normal" officeooo:rsid="000fd1fc" officeooo:paragraph-rsid="0010cf8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4pt" fo:font-weight="normal" officeooo:rsid="0010cf8f" officeooo:paragraph-rsid="0010cf8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normal" officeooo:rsid="00122289" officeooo:paragraph-rsid="0012228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26pt" fo:font-weight="bold" officeooo:rsid="00122289" officeooo:paragraph-rsid="00122289" style:font-size-asian="26pt" style:font-weight-asian="bold" style:font-size-complex="2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4pt" fo:font-style="normal" fo:font-weight="normal" officeooo:rsid="00122289" officeooo:paragraph-rsid="00122289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4pt" fo:font-style="normal" fo:font-weight="normal" officeooo:rsid="00136620" officeooo:paragraph-rsid="0013662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e85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22289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3">Mobile Game Development</text:p>
      <text:p text:style-name="P4">Kieran Pisani DGD 6.1A</text:p>
      <text:p text:style-name="P5"><draw:frame draw:style-name="fr1" draw:name="Image1" text:anchor-type="char" svg:x="-0.052in" svg:y="0.0717in" svg:width="6.6929in" svg:height="1.0909in" draw:z-index="0"><draw:image xlink:href="Pictures/10000001000002900000006B7A098EA1.png" xlink:type="simple" xlink:show="embed" xlink:actuate="onLoad" draw:mime-type="image/png"/></draw:frame></text:p>
      <text:p text:style-name="P6"/>
      <text:p text:style-name="P6">I first started by adding the <text:span text:style-name="T1">‘</text:span><text:span text:style-name="T2">Selectable</text:span>’ group on the draggable boxes <text:span text:style-name="T3">(they’re TextureButtons for the sake of animations)</text:span></text:p>
      <text:p text:style-name="P6"><draw:frame draw:style-name="fr1" draw:name="Image2" text:anchor-type="char" svg:x="0in" svg:y="0.1189in" svg:width="6.6929in" svg:height="3.2756in" draw:z-index="1"><draw:image xlink:href="Pictures/100000010000067D0000032D2C0473DA.png" xlink:type="simple" xlink:show="embed" xlink:actuate="onLoad" draw:mime-type="image/png"/></draw:frame></text:p>
      <text:p text:style-name="P6">To create the group itself was relatively easy, just click the ‘<text:span text:style-name="T4">+</text:span><text:span text:style-name="T5">’ symbol at the top left of the panel and give it a name.</text:span></text:p>
      <text:p text:style-name="P7"><draw:frame draw:style-name="fr1" draw:name="Image3" text:anchor-type="char" svg:x="0.95in" svg:y="0.1992in" svg:width="4.7929in" svg:height="2.9728in" draw:z-index="2"><draw:image xlink:href="Pictures/100000010000041300000287DCE5B25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I then added this portion of code to the <text:span text:style-name="T3">buttons’</text:span> script:</text:p>
      <text:p text:style-name="P7"><draw:frame draw:style-name="fr2" draw:name="Image5" text:anchor-type="char" svg:width="5.1583in" svg:height="2.2291in" draw:z-index="4"><draw:image xlink:href="Pictures/1000000100000459000001E1A95508DE.png" xlink:type="simple" xlink:show="embed" xlink:actuate="onLoad" draw:mime-type="image/png"/></draw:frame></text:p>
      <text:p text:style-name="P8"><draw:frame draw:style-name="fr2" draw:name="Image4" text:anchor-type="char" svg:width="6.6929in" svg:height="2.5465in" draw:z-index="3"><draw:image xlink:href="Pictures/10000001000004BE000001CE66E39FF2.png" xlink:type="simple" xlink:show="embed" xlink:actuate="onLoad" draw:mime-type="image/png"/></draw:frame>(I just wrote all the instructions/uses in the screenshots.. couldn’t be bothered organizing it here sorry. :[ )</text:p>
      <text:p text:style-name="P8"/>
      <text:p text:style-name="P8"/>
      <text:p text:style-name="P7">After which, I created the drop box.</text:p>
      <text:p text:style-name="P9"><draw:frame draw:style-name="fr3" draw:name="Image6" text:anchor-type="char" svg:width="6.6929in" svg:height="2.9252in" draw:z-index="5"><draw:image xlink:href="Pictures/100000010000057600000263EF3033C3.png" xlink:type="simple" xlink:show="embed" xlink:actuate="onLoad" draw:mime-type="image/png"/></draw:frame>To which I also assigned it’s own group called Droppable</text:p>
      <text:p text:style-name="P9"/>
      <text:p text:style-name="P9"/>
      <text:p text:style-name="P9"/>
      <text:p text:style-name="P9"><draw:frame draw:style-name="fr1" draw:name="Image7" text:anchor-type="char" svg:x="0in" svg:y="-0.1291in" svg:width="6.6929in" svg:height="3.7146in" draw:z-index="6"><draw:image xlink:href="Pictures/10000001000003C200000216D0CC2D74.png" xlink:type="simple" xlink:show="embed" xlink:actuate="onLoad" draw:mime-type="image/png"/></draw:frame><text:soft-page-break/></text:p>
      <text:p text:style-name="P9">And wrote this script attached to it:</text:p>
      <text:p text:style-name="P10"><draw:frame draw:style-name="fr4" draw:name="Image8" text:anchor-type="char" svg:width="6.6929in" svg:height="1.6457in" draw:z-index="7"><draw:image xlink:href="Pictures/100000010000041500000101B3A5E221.png" xlink:type="simple" xlink:show="embed" xlink:actuate="onLoad" draw:mime-type="image/png"/></draw:frame>(I used NinePatchRect because I want to make my texture’s borders look pretty)</text:p>
      <text:p text:style-name="P10"/>
      <text:p text:style-name="P10"/>
      <text:p text:style-name="P9">Inside the main game logic:</text:p>
      <text:p text:style-name="P9"><draw:frame draw:style-name="fr1" draw:name="Image9" text:anchor-type="char" svg:x="0in" svg:y="0.1354in" svg:width="6.6929in" svg:height="0.8362in" draw:z-index="8"><draw:image xlink:href="Pictures/10000001000002D00000005A75D4B25B.png" xlink:type="simple" xlink:show="embed" xlink:actuate="onLoad" draw:mime-type="image/png"/></draw:frame></text:p>
      <text:p text:style-name="P9"><draw:frame draw:style-name="fr1" draw:name="Image10" text:anchor-type="char" svg:x="-0.0008in" svg:y="0.1626in" svg:width="6.6929in" svg:height="2.298in" draw:z-index="9"><draw:image xlink:href="Pictures/10000001000003C10000014A824DC1FC.png" xlink:type="simple" xlink:show="embed" xlink:actuate="onLoad" draw:mime-type="image/png"/></draw:frame></text:p>
      <text:p text:style-name="P11">That said, this also answers the question partially:</text:p>
      <text:p text:style-name="P12"><draw:frame draw:style-name="fr1" draw:name="Image11" text:anchor-type="char" svg:x="0.039in" svg:y="0.111in" svg:width="6.6154in" svg:height="1.1354in" draw:z-index="10"><draw:image xlink:href="Pictures/100000010000027B0000006D4EAC3F3B.png" xlink:type="simple" xlink:show="embed" xlink:actuate="onLoad" draw:mime-type="image/png"/></draw:frame></text:p>
      <text:p text:style-name="P12">In that particular situation, I used signals so I can just send data from the drop box to the main logic loop without having to cross-reference/possible hard-coding any of the logic, considering how variable answers are anyway.</text:p>
      <text:p text:style-name="P12"/>
      <text:p text:style-name="P12">However, to provide another example:</text:p>
      <text:p text:style-name="P12"/>
      <text:p text:style-name="P12"><draw:frame draw:style-name="fr4" draw:name="Image12" text:anchor-type="char" svg:width="6.6929in" svg:height="3.8102in" draw:z-index="11"><draw:image xlink:href="Pictures/10000001000005760000031C8341AC29.png" xlink:type="simple" xlink:show="embed" xlink:actuate="onLoad" draw:mime-type="image/png"/></draw:frame>Every box in this grid (that is very evidently marked by red.. all over) emit the signal buttonPressed</text:p>
      <text:p text:style-name="P12"/>
      <text:p text:style-name="P12"><draw:frame draw:style-name="fr4" draw:name="Image13" text:anchor-type="char" svg:width="6.6929in" svg:height="2.6736in" draw:z-index="12"><draw:image xlink:href="Pictures/10000001000003A300000174867B9500.png" xlink:type="simple" xlink:show="embed" xlink:actuate="onLoad" draw:mime-type="image/png"/></draw:frame><text:soft-page-break/>This then sends the data ‘node’ and ‘value’ to the main logic loop of the second game.</text:p>
      <text:p text:style-name="P12"><draw:frame draw:style-name="fr1" draw:name="Image14" text:anchor-type="char" svg:x="0in" svg:y="0.1984in" svg:width="6.6929in" svg:height="4.7744in" draw:z-index="13"><draw:image xlink:href="Pictures/10000001000002EE00000217E940C178.png" xlink:type="simple" xlink:show="embed" xlink:actuate="onLoad" draw:mime-type="image/png"/></draw:frame></text:p>
      <text:p text:style-name="P13">I was having some problems with adding multiple connections, so I checked if there’s an existing connection first and resetted it.</text:p>
      <text:p text:style-name="P13"/>
      <text:p text:style-name="P12"/>
      <text:p text:style-name="P14"><draw:frame draw:style-name="fr1" draw:name="Image15" text:anchor-type="char" svg:x="0.0646in" svg:y="-0.5366in" svg:width="6.6929in" svg:height="3.6835in" draw:z-index="14"><draw:image xlink:href="Pictures/10000001000002DE000001941EE697CE.png" xlink:type="simple" xlink:show="embed" xlink:actuate="onLoad" draw:mime-type="image/png"/></draw:frame><text:soft-page-break/>Now that the data from the buttons are passed on the main logic loop, the data of the button can be handled properly without hard-coding!</text:p>
      <text:p text:style-name="P15"/>
      <text:p text:style-name="P15">I’ve also used it because although the value of the button is given in the SAME script, it’s out of scope to be checked if user’s input is correct or not.</text:p>
      <text:p text:style-name="P15"/>
      <text:p text:style-name="P15">Plus the added benefit that you do not have to go through dictionaries of data when the ‘data itself’ just calls instead. <text:span text:style-name="T6">It also keeps everything decoupled.</text:span></text:p>
      <text:p text:style-name="P15"/>
      <text:p text:style-name="P15">-------------------------------------------------------------------------------------------------------</text:p>
      <text:p text:style-name="P15"/>
      <text:p text:style-name="P15"><draw:frame draw:style-name="fr5" draw:name="Image16" text:anchor-type="char" svg:width="6.5839in" svg:height="0.5209in" draw:z-index="15"><draw:image xlink:href="Pictures/1000000100000278000000329C38DA3F.png" xlink:type="simple" xlink:show="embed" xlink:actuate="onLoad" draw:mime-type="image/png"/></draw:frame></text:p>
      <text:p text:style-name="P15"/>
      <text:p text:style-name="P16">Moving on to singletons… I have two things: <text:span text:style-name="T2">TransitionScreen</text:span> and <text:span text:style-name="T2">MessageScreen</text:span>.</text:p>
      <text:p text:style-name="P16"/>
      <text:p text:style-name="P16">To preface, the reason why I have these singletons is so I don’t have to import them in every single scene manually when they have the same functionality.</text:p>
      <text:p text:style-name="P16"/>
      <text:p text:style-name="P16">I also use <text:span text:style-name="T2">TransitionScreen</text:span> specifically because I want it to work between.. you guessed it.. transitioning screens. If it wasn’t a singleton, that wouldn’t be possible. It also makes sure that there is only ONE instance of each in the whole game as I don’t need multiple transitions for every level or different message systems every scene, I kept it modular!</text:p>
      <text:p text:style-name="P16"/>
      <text:p text:style-name="P16"/>
      <text:p text:style-name="P16"><text:soft-page-break/></text:p>
      <text:p text:style-name="P17">TransitionScreen</text:p>
      <text:p text:style-name="P16"><draw:frame draw:style-name="fr1" draw:name="Image17" text:anchor-type="char" svg:x="0.048in" svg:y="0.0709in" svg:width="6.6929in" svg:height="4.0827in" draw:z-index="16"><draw:image xlink:href="Pictures/10000001000004470000029CFDAE9FD5.png" xlink:type="simple" xlink:show="embed" xlink:actuate="onLoad" draw:mime-type="image/png"/></draw:frame></text:p>
      <text:p text:style-name="P16">This one is pretty simple, it’s an instance of ‘ColorRect’ and some fancy stuff like Animation and Audio, which fades to white and into another scene when u<draw:frame draw:style-name="fr1" draw:name="Image18" text:anchor-type="char" svg:x="0.0244in" svg:y="0.7957in" svg:width="6.6929in" svg:height="4.2772in" draw:z-index="17"><draw:image xlink:href="Pictures/100000010000062E000003F31DC62F71.png" xlink:type="simple" xlink:show="embed" xlink:actuate="onLoad" draw:mime-type="image/png"/></draw:frame>sed.</text:p>
      <text:p text:style-name="P16"><text:soft-page-break/>I added the singletons from <text:span text:style-name="T7">Project Settings &gt; Globals, </text:span><text:span text:style-name="T1">imported the components (the singleton files) inside the path and gave them a reference name that is used in code.</text:span></text:p>
      <text:p text:style-name="P18"/>
      <text:p text:style-name="P19"><draw:frame draw:style-name="fr4" draw:name="Image19" text:anchor-type="char" svg:width="6.6929in" svg:height="3.548in" draw:z-index="18"><draw:image xlink:href="Pictures/10000001000004350000023BCA195763.png" xlink:type="simple" xlink:show="embed" xlink:actuate="onLoad" draw:mime-type="image/png"/></draw:frame>Example use:</text:p>
      <text:p text:style-name="P19"><draw:frame draw:style-name="fr4" draw:name="Image20" text:anchor-type="char" svg:width="6.6929in" svg:height="0.7783in" draw:z-index="19"><draw:image xlink:href="Pictures/10000001000004180000007A19F03A47.png" xlink:type="simple" xlink:show="embed" xlink:actuate="onLoad" draw:mime-type="image/png"/></draw:frame>(this script is for the go back to menu and restart button in every level)</text:p>
      <text:p text:style-name="P19"/>
      <text:p text:style-name="P19">And that’s one example of the singletons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er_20_left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df475" officeooo:paragraph-rsid="000df47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20:45:35.451202500</meta:creation-date>
    <dc:date>2026-05-02T21:51:26.807489000</dc:date>
    <meta:editing-duration>PT12M45S</meta:editing-duration>
    <meta:editing-cycles>4</meta:editing-cycles>
    <meta:generator>LibreOffice/25.8.5.2$Windows_X86_64 LibreOffice_project/9c8b85f387cc00a89945a79c9e6239f32e450ac2</meta:generator>
    <meta:document-statistic meta:table-count="0" meta:image-count="20" meta:object-count="0" meta:page-count="9" meta:paragraph-count="30" meta:word-count="494" meta:character-count="2943" meta:non-whitespace-character-count="2479"/>
  </office:meta>
</office:document-meta>
</file>